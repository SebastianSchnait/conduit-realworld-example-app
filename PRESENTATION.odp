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4.7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2cm" fo:margin-bottom="0cm" fo:text-align="center" fo:text-indent="0cm"/>
    </style:style>
    <style:style style:name="P2" style:family="paragraph">
      <style:paragraph-properties fo:margin-left="0.4cm" fo:margin-right="0cm" fo:margin-top="0.08cm" fo:margin-bottom="0cm" fo:text-align="left" fo:text-indent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.4cm" fo:margin-right="0cm" fo:margin-top="0.08cm" fo:margin-bottom="0cm" fo:text-align="left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text-align="left" fo:text-indent="0cm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style:paragraph-properties fo:margin-left="0.4cm" fo:margin-right="0cm" fo:margin-top="0.08cm" fo:margin-bottom="0cm" fo:text-align="left" fo:text-indent="0cm"/>
      <style:text-properties fo:font-size="20pt" style:font-size-asian="20pt" style:font-size-complex="20pt"/>
    </style:style>
    <style:style style:name="P9" style:family="paragraph">
      <style:paragraph-properties fo:margin-left="0.8cm" fo:margin-right="0cm" fo:margin-top="0.08cm" fo:margin-bottom="0cm" fo:text-align="left" fo:text-indent="0cm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style:paragraph-properties fo:margin-left="1.3cm" fo:margin-right="0cm" fo:margin-top="0.08cm" fo:margin-bottom="0cm" fo:text-align="left" fo:text-indent="0cm"/>
      <style:text-properties fo:font-size="20pt" style:font-size-asian="20pt" style:font-size-complex="20pt"/>
    </style:style>
    <style:style style:name="T1" style:family="text">
      <style:text-properties fo:color="#1f3864" loext:opacity="100%" style:font-name="Calibri" fo:font-size="34pt" fo:font-weight="bold"/>
    </style:style>
    <style:style style:name="T2" style:family="text">
      <style:text-properties fo:color="#2e75b6" loext:opacity="100%" style:font-name="Calibri" fo:font-size="20pt"/>
    </style:style>
    <style:style style:name="T3" style:family="text">
      <style:text-properties fo:color="#555555" loext:opacity="100%" style:font-name="Calibri" fo:font-size="11pt"/>
    </style:style>
    <style:style style:name="T4" style:family="text">
      <style:text-properties fo:color="#1f3864" loext:opacity="100%" style:font-name="Calibri" fo:font-size="36pt" fo:font-weight="bold" style:font-size-asian="36pt" style:font-size-complex="36pt"/>
    </style:style>
    <style:style style:name="T5" style:family="text">
      <style:text-properties fo:color="#2e75b6" loext:opacity="100%" style:font-name="Calibri" fo:font-size="36pt" style:font-size-asian="36pt" style:font-size-complex="36pt"/>
    </style:style>
    <style:style style:name="T6" style:family="text">
      <style:text-properties fo:color="#2e75b6" loext:opacity="100%" style:font-name="Calibri" fo:font-size="20pt" fo:font-weight="bold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222222" loext:opacity="100%" style:font-name="Calibri" fo:font-size="20pt" style:font-size-asian="20pt" style:font-size-complex="20pt"/>
    </style:style>
    <style:style style:name="T9" style:family="text">
      <style:text-properties fo:color="#555555" loext:opacity="100%" style:font-name="Calibri" fo:font-size="20pt" style:font-size-asian="20pt" style:font-size-complex="20pt"/>
    </style:style>
    <style:style style:name="T10" style:family="text">
      <style:text-properties fo:color="#b22222" loext:opacity="100%" style:font-name="Courier New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3.4cm" svg:height="10cm" svg:x="1cm" svg:y="4.5cm">
          <draw:text-box>
            <text:p text:style-name="P1"><text:span text:style-name="T1">Conduit RealWorld</text:span></text:p>
            <text:p text:style-name="P1"><text:span text:style-name="T2">Testdokumentation &amp; Testergebnisse</text:span></text:p>
            <text:p text:style-name="P2"/>
            <text:p text:style-name="P2"/>
            <text:p text:style-name="P1"><text:span text:style-name="T3">Sebastian Schnait · Finn Dorninger</text:span></text:p>
            <text:p text:style-name="P1"><text:span text:style-name="T3">WAT – Sommersemester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Webanwendung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23.4cm" svg:height="15cm" svg:x="1cm" svg:y="3.2cm">
          <draw:text-box>
            <text:p text:style-name="P8"><text:span text:style-name="T6">Conduit RealWorld Example App</text:span></text:p>
            <text:p text:style-name="P8"><text:span text:style-name="T7"/></text:p>
            <text:p text:style-name="P8"><text:span text:style-name="T8">Vollständige Blog-Plattform – Referenzimplementierung des RealWorld-Projekts</text:span></text:p>
            <text:p text:style-name="P8"><text:span text:style-name="T7"/></text:p>
            <text:p text:style-name="P9"><text:span text:style-name="T8">▸ Frontend: React (Vite + SWC), HashRouter</text:span></text:p>
            <text:p text:style-name="P9"><text:span text:style-name="T8">▸ Backend: Node.js / Express.js REST-API</text:span></text:p>
            <text:p text:style-name="P9"><text:span text:style-name="T8">▸ Datenbank: MSSQL 2022 (Docker) + Sequelize ORM</text:span></text:p>
            <text:p text:style-name="P9"><text:span text:style-name="T8">▸ Auth: JWT + bcrypt</text:span></text:p>
            <text:p text:style-name="P8"><text:span text:style-name="T7"/></text:p>
            <text:p text:style-name="P8"><text:span text:style-name="T8">Features: Registrierung · Login · Artikel CRUD · Kommentare · Tags · Favoriten · Follow-System</text:span></text:p>
            <text:p text:style-name="P8"><text:span text:style-name="T7"/></text:p>
            <text:p text:style-name="P8"><text:span text:style-name="T9">Dev-Server: npm run dev (Frontend :3000 · Backend-API :300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Teststrategie – Überblick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11.5cm" svg:height="15cm" svg:x="1cm" svg:y="3.2cm">
          <draw:text-box>
            <text:p text:style-name="P8"><text:span text:style-name="T6">Testpyramide</text:span></text:p>
            <text:p text:style-name="P8"><text:span text:style-name="T7"/></text:p>
            <text:p text:style-name="P8"><text:span text:style-name="T10">+------------------+</text:span></text:p>
            <text:p text:style-name="P8"><text:span text:style-name="T10">| E2E (4) | Playwright</text:span></text:p>
            <text:p text:style-name="P8"><text:span text:style-name="T10">+------------------+</text:span></text:p>
            <text:p text:style-name="P8"><text:span text:style-name="T10">| Integr. (6) | </text:span><text:span text:style-name="T10">Supertest+DB</text:span></text:p>
            <text:p text:style-name="P8"><text:span text:style-name="T10">+------------------+</text:span></text:p>
            <text:p text:style-name="P8"><text:span text:style-name="T10">| Unit (13) | Vitest</text:span></text:p>
            <text:p text:style-name="P8"><text:span text:style-name="T10">+------------------+</text:span></text:p>
            <text:p text:style-name="P8"><text:span text:style-name="T7"/></text:p>
            <text:p text:style-name="P8"><text:span text:style-name="T9">+ 2 Load-Tests (k6)</text:span></text:p>
          </draw:text-box>
        </draw:frame>
        <draw:frame draw:style-name="gr4" draw:text-style-name="P10" draw:layer="layout" svg:width="10.5cm" svg:height="15cm" svg:x="14cm" svg:y="3.2cm">
          <draw:text-box>
            <text:p text:style-name="P8"><text:span text:style-name="T6">Frameworks</text:span></text:p>
            <text:p text:style-name="P8"><text:span text:style-name="T7"/></text:p>
            <text:p text:style-name="P8"><text:span text:style-name="T6">Vitest 4</text:span></text:p>
            <text:p text:style-name="P9"><text:span text:style-name="T9">Unit- &amp; Integrationstests</text:span></text:p>
            <text:p text:style-name="P8"><text:span text:style-name="T7"/></text:p>
            <text:p text:style-name="P8"><text:span text:style-name="T6">Supertest</text:span></text:p>
            <text:p text:style-name="P9"><text:span text:style-name="T9">HTTP gegen Express (in-process)</text:span></text:p>
            <text:p text:style-name="P8"><text:span text:style-name="T7"/></text:p>
            <text:p text:style-name="P8"><text:span text:style-name="T6">Playwright</text:span></text:p>
            <text:p text:style-name="P9"><text:span text:style-name="T9">Browser-E2E (Chromium, headless)</text:span></text:p>
            <text:p text:style-name="P8"><text:span text:style-name="T7"/></text:p>
            <text:p text:style-name="P8"><text:span text:style-name="T6">k6</text:span></text:p>
            <text:p text:style-name="P9"><text:span text:style-name="T9">Last-Tests mit virtuellen Nutzer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Unit Tests (13 Tests)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23.4cm" svg:height="15cm" svg:x="1cm" svg:y="3.2cm">
          <draw:text-box>
            <text:p text:style-name="P8"><text:span text:style-name="T9">Datei: backend/tests/unit/helpers.unit.test.js</text:span></text:p>
            <text:p text:style-name="P8"><text:span text:style-name="T7"/></text:p>
            <text:p text:style-name="P8"><text:span text:style-name="T6">Was wurde getestet?</text:span></text:p>
            <text:p text:style-name="P9"><text:span text:style-name="T8">▸ slugify() – URL-Slug-Generierung: Leerzeichen, Unterstriche, Sonderzeichen (3 Tests)</text:span></text:p>
            <text:p text:style-name="P9"><text:span text:style-name="T8">▸ appendTagList() – Tag-Namen-Array + Mutation von article.dataValues.tagList (4 Tests)</text:span></text:p>
            <text:p text:style-name="P9"><text:span text:style-name="T8">▸ appendFollowers() – Follower-Zähler &amp; Following-Flag, inkl. Fehlerfall (3 Tests)</text:span></text:p>
            <text:p text:style-name="P9"><text:span text:style-name="T8">▸ appendFavorites() – Favoriten-Status &amp; -Zähler, mit/ohne eingeloggten User (3 Tests)</text:span></text:p>
            <text:p text:style-name="P8"><text:span text:style-name="T7"/></text:p>
            <text:p text:style-name="P8"><text:span text:style-name="T6">Warum Unit Tests?</text:span></text:p>
            <text:p text:style-name="P9"><text:span text:style-name="T8">▸ Helfer-Funktionen sind Bausteine aller Controller – Fehler pflanzen sich überall fort</text:span></text:p>
            <text:p text:style-name="P9"><text:span text:style-name="T8">▸ Kein Datenbankzugriff nötig – schnelle Ausführung, vollständige Isolation</text:span></text:p>
            <text:p text:style-name="P9"><text:span text:style-name="T8">▸ Externe Abhängigkeiten (DB-Calls) werden mit vi.fn() gemock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Integrationstests (3 HTTP + 3 Datenbank)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11.5cm" svg:height="15cm" svg:x="1cm" svg:y="3.2cm">
          <draw:text-box>
            <text:p text:style-name="P8"><text:span text:style-name="T6">HTTP-Schicht (api.integration.test.js)</text:span></text:p>
            <text:p text:style-name="P8"><text:span text:style-name="T9">Läuft in CI – ohne echte DB</text:span></text:p>
            <text:p text:style-name="P8"><text:span text:style-name="T7"/></text:p>
            <text:p text:style-name="P9"><text:span text:style-name="T8">▸ POST /api/users – Registrierung liefert</text:span></text:p>
            <text:p text:style-name="P11"><text:span text:style-name="T9">kein password / id in der Antwort</text:span></text:p>
            <text:p text:style-name="P9"><text:span text:style-name="T8">▸ POST /api/users – 422 bei fehlendem Username</text:span></text:p>
            <text:p text:style-name="P9"><text:span text:style-name="T8">▸ POST /api/articles – Artikel mit Tags &amp; Author</text:span></text:p>
            <text:p text:style-name="P8"><text:span text:style-name="T7"/></text:p>
            <text:p text:style-name="P8"><text:span text:style-name="T6">Wie?</text:span></text:p>
            <text:p text:style-name="P9"><text:span text:style-name="T9">Supertest schickt HTTP-Requests gegen</text:span></text:p>
            <text:p text:style-name="P9"><text:span text:style-name="T9">die Express-App (kein Netzwerk-Port).</text:span></text:p>
            <text:p text:style-name="P9"><text:span text:style-name="T9">Sequelize-Modelle via vi.spyOn() gemockt.</text:span></text:p>
          </draw:text-box>
        </draw:frame>
        <draw:frame draw:style-name="gr4" draw:text-style-name="P10" draw:layer="layout" svg:width="11cm" svg:height="15.777cm" svg:x="13.5cm" svg:y="3.2cm">
          <draw:text-box>
            <text:p text:style-name="P8"><text:span text:style-name="T6">Datenbank-Schicht (db.integration.test.js)</text:span></text:p>
            <text:p text:style-name="P8"><text:span text:style-name="T9">Nur lokal: npm run test:db</text:span></text:p>
            <text:p text:style-name="P8"><text:span text:style-name="T7"/></text:p>
            <text:p text:style-name="P9"><text:span text:style-name="T8">▸ User.toJSON() enthält kein Passwort &amp; keine ID</text:span></text:p>
            <text:p text:style-name="P9"><text:span text:style-name="T8">▸ Tags mit Sonderzeichen korrekt gespeichert</text:span></text:p>
            <text:p text:style-name="P9"><text:span text:style-name="T8">▸ Follower-Beziehung: bidirektionale Abfrage stimmt</text:span></text:p>
            <text:p text:style-name="P8"><text:span text:style-name="T7"/></text:p>
            <text:p text:style-name="P8"><text:span text:style-name="T6">Herausforderung:</text:span></text:p>
            <text:p text:style-name="P9"><text:span text:style-name="T9">FK-Constraints erfordern Löschreihenfolge</text:span></text:p>
            <text:p text:style-name="P9"><text:span text:style-name="T9">im beforeEach:</text:span></text:p>
            <text:p text:style-name="P9"><text:span text:style-name="T10">Followers → Articles → Tags → Users</text:span></text:p>
            <text:p text:style-name="P8"><text:span text:style-name="T7"/></text:p>
            <text:p text:style-name="P8"><text:span text:style-name="T9">In CI ausgeschlossen – benötigt Docke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E2E-Tests (4 Tests · Playwright)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11.5cm" svg:height="15cm" svg:x="1cm" svg:y="3.2cm">
          <draw:text-box>
            <text:p text:style-name="P8"><text:span text:style-name="T6">Was wurde getestet?</text:span></text:p>
            <text:p text:style-name="P8"><text:span text:style-name="T7"/></text:p>
            <text:p text:style-name="P9"><text:span text:style-name="T8">▸ Neuen User registrieren</text:span></text:p>
            <text:p text:style-name="P9"><text:span text:style-name="T8">▸ Bestehenden User einloggen</text:span></text:p>
            <text:p text:style-name="P9"><text:span text:style-name="T8">▸ Artikel erstellen &amp; veröffentlichen</text:span></text:p>
            <text:p text:style-name="P9"><text:span text:style-name="T8">▸ Kommentar zu einem Artikel hinzufügen</text:span></text:p>
            <text:p text:style-name="P8"><text:span text:style-name="T7"/></text:p>
            <text:p text:style-name="P8"><text:span text:style-name="T6">Warum E2E?</text:span></text:p>
            <text:p text:style-name="P9"><text:span text:style-name="T8">▸ Prüft die gesamte Anwendung aus</text:span></text:p>
            <text:p text:style-name="P11"><text:span text:style-name="T9">Nutzerperspektive (Frontend + Backend + DB)</text:span></text:p>
            <text:p text:style-name="P9"><text:span text:style-name="T8">▸ Erkennt Integrationsfehler zwischen den Schichten</text:span></text:p>
          </draw:text-box>
        </draw:frame>
        <draw:frame draw:style-name="gr4" draw:text-style-name="P10" draw:layer="layout" svg:width="11cm" svg:height="15cm" svg:x="13.5cm" svg:y="3.2cm">
          <draw:text-box>
            <text:p text:style-name="P8"><text:span text:style-name="T6">Wie? – Page Object Model (POM)</text:span></text:p>
            <text:p text:style-name="P8"><text:span text:style-name="T7"/></text:p>
            <text:p text:style-name="P9"><text:span text:style-name="T10">AuthPage.ts</text:span></text:p>
            <text:p text:style-name="P11"><text:span text:style-name="T9">register(), login()</text:span></text:p>
            <text:p text:style-name="P9"><text:span text:style-name="T10">HomePage.ts</text:span></text:p>
            <text:p text:style-name="P11"><text:span text:style-name="T9">logout(), userNavbarLink</text:span></text:p>
            <text:p text:style-name="P9"><text:span text:style-name="T10">ArticlePage.ts</text:span></text:p>
            <text:p text:style-name="P11"><text:span text:style-name="T9">articleTitle, addComment()</text:span></text:p>
            <text:p text:style-name="P9"><text:span text:style-name="T10">EditorPage.ts</text:span></text:p>
            <text:p text:style-name="P11"><text:span text:style-name="T9">goto(), publishArticle()</text:span></text:p>
            <text:p text:style-name="P8"><text:span text:style-name="T7"/></text:p>
            <text:p text:style-name="P8"><text:span text:style-name="T9">Browser: Chromium (headless)</text:span></text:p>
            <text:p text:style-name="P8"><text:span text:style-name="T9">App muss laufen: npm run de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Load-Tests (k6) – Szenarien &amp; Ergebnisse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11.5cm" svg:height="15cm" svg:x="1cm" svg:y="3.2cm">
          <draw:text-box>
            <text:p text:style-name="P8"><text:span text:style-name="T6">articles.js – GET /api/articles</text:span></text:p>
            <text:p text:style-name="P8"><text:span text:style-name="T7"/></text:p>
            <text:p text:style-name="P8"><text:span text:style-name="T6">Szenario:</text:span></text:p>
            <text:p text:style-name="P9"><text:span text:style-name="T9">0→50 VUs in 30 s · 50 VUs für 1 min · Ramp-down</text:span></text:p>
            <text:p text:style-name="P8"><text:span text:style-name="T7"/></text:p>
            <text:p text:style-name="P8"><text:span text:style-name="T9">Schwellwert: p(95) &lt; 1000 ms · Fehlerrate &lt; 5 %</text:span></text:p>
            <text:p text:style-name="P8"><text:span text:style-name="T7"/></text:p>
            <text:p text:style-name="P8"><text:span text:style-name="T6">Ergebnisse (lokal):</text:span></text:p>
            <text:p text:style-name="P9"><text:span text:style-name="T8">▸ 812 Iterationen · 7,7 req/s</text:span></text:p>
            <text:p text:style-name="P9"><text:span text:style-name="T8">▸ HTTP-Fehlerrate: 0 % ✓</text:span></text:p>
            <text:p text:style-name="P9"><text:span text:style-name="T8">▸ p95 Latenz: 6,5 s (threshold ✗)</text:span></text:p>
            <text:p text:style-name="P9"><text:span text:style-name="T8">▸ Min: 185 ms · Median: 4,6 s</text:span></text:p>
          </draw:text-box>
        </draw:frame>
        <draw:frame draw:style-name="gr4" draw:text-style-name="P10" draw:layer="layout" svg:width="11cm" svg:height="15cm" svg:x="13.5cm" svg:y="3.2cm">
          <draw:text-box>
            <text:p text:style-name="P8"><text:span text:style-name="T6">auth.js – POST /api/users/login</text:span></text:p>
            <text:p text:style-name="P8"><text:span text:style-name="T7"/></text:p>
            <text:p text:style-name="P8"><text:span text:style-name="T6">Szenario (Spike):</text:span></text:p>
            <text:p text:style-name="P9"><text:span text:style-name="T9">0→30 VUs in 15 s · 30 VUs für 45 s · Release</text:span></text:p>
            <text:p text:style-name="P8"><text:span text:style-name="T7"/></text:p>
            <text:p text:style-name="P8"><text:span text:style-name="T9">Schwellwert: p(95) &lt; 1000 ms · Fehlerrate &lt; 5 %</text:span></text:p>
            <text:p text:style-name="P8"><text:span text:style-name="T7"/></text:p>
            <text:p text:style-name="P8"><text:span text:style-name="T6">Ergebnisse (lokal):</text:span></text:p>
            <text:p text:style-name="P9"><text:span text:style-name="T8">▸ 943 Iterationen · 13,4 req/s</text:span></text:p>
            <text:p text:style-name="P9"><text:span text:style-name="T8">▸ HTTP-Fehlerrate: 0 % ✓</text:span></text:p>
            <text:p text:style-name="P9"><text:span text:style-name="T8">▸ p95 Latenz: 1,9 s (threshold ✗)</text:span></text:p>
            <text:p text:style-name="P9"><text:span text:style-name="T8">▸ 100 % Login-Erfolg: HTTP 200 + Token ✓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Load-Tests – Analyse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23.4cm" svg:height="15cm" svg:x="1cm" svg:y="3.2cm">
          <draw:text-box>
            <text:p text:style-name="P8"><text:span text:style-name="T6">Korrektheit ✓</text:span></text:p>
            <text:p text:style-name="P8"><text:span text:style-name="T8">HTTP-Fehlerrate = 0 % in beiden Tests – alle Requests lieferten korrekte Antworten.</text:span></text:p>
            <text:p text:style-name="P8"><text:span text:style-name="T7"/></text:p>
            <text:p text:style-name="P8"><text:span text:style-name="T6">Warum überschreiten die Latenzen die Schwellwerte?</text:span></text:p>
            <text:p text:style-name="P9"><text:span text:style-name="T8">▸ Vite Dev Server – kein Produktions-Build, kein Bundling-Cache</text:span></text:p>
            <text:p text:style-name="P9"><text:span text:style-name="T8">▸ ORM-Overhead – Sequelize JOINs über Tags, Autoren, Favoriten</text:span></text:p>
            <text:p text:style-name="P9"><text:span text:style-name="T8">▸ Docker MSSQL – teilt CPU/RAM mit Dev-Stack auf demselben Rechner</text:span></text:p>
            <text:p text:style-name="P9"><text:span text:style-name="T8">▸ bcrypt cost=10 – ~100–300 ms pro Login; 30 parallele Hashes auf 1 Kern</text:span></text:p>
            <text:p text:style-name="P8"><text:span text:style-name="T7"/></text:p>
            <text:p text:style-name="P8"><text:span text:style-name="T6">Fazit</text:span></text:p>
            <text:p text:style-name="P8"><text:span text:style-name="T8">Die Schwellwerte sind auf eine Produktionsumgebung (Build, dedizierter DB-Server) ausgelegt.</text:span></text:p>
            <text:p text:style-name="P8"><text:span text:style-name="T8">Die Tests beweisen Stabilität und Korrektheit – nicht Produktionsperformanc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3" draw:text-style-name="P7" draw:layer="layout" svg:width="23.4cm" svg:height="2.793cm" svg:x="1cm" svg:y="0.5cm">
          <draw:text-box>
            <text:p text:style-name="P5"><text:span text:style-name="T4">CI/CD-Pipeline (GitHub Actions)</text:span></text:p>
            <text:p text:style-name="P6"><text:span text:style-name="T5">────────────────────────────────────</text:span></text:p>
          </draw:text-box>
        </draw:frame>
        <draw:frame draw:style-name="gr4" draw:text-style-name="P10" draw:layer="layout" svg:width="11.5cm" svg:height="15cm" svg:x="1cm" svg:y="3.2cm">
          <draw:text-box>
            <text:p text:style-name="P8"><text:span text:style-name="T6">Pipeline-Struktur</text:span></text:p>
            <text:p text:style-name="P8"><text:span text:style-name="T7"/></text:p>
            <text:p text:style-name="P9"><text:span text:style-name="T8">Trigger: push / PR auf main</text:span></text:p>
            <text:p text:style-name="P8"><text:span text:style-name="T7"/></text:p>
            <text:p text:style-name="P8"><text:span text:style-name="T6">Job: Unit &amp; Integration Tests</text:span></text:p>
            <text:p text:style-name="P9"><text:span text:style-name="T8">▸ ubuntu-latest (kein DB-Service!)</text:span></text:p>
            <text:p text:style-name="P9"><text:span text:style-name="T8">▸ checkout → npm ci</text:span></text:p>
            <text:p text:style-name="P9"><text:span text:style-name="T8">▸ npm test -- --reporter=verbose</text:span></text:p>
            <text:p text:style-name="P9"><text:span text:style-name="T8">▸ JWT_KEY als Env-Variable gesetzt</text:span></text:p>
            <text:p text:style-name="P8"><text:span text:style-name="T7"/></text:p>
            <text:p text:style-name="P8"><text:span text:style-name="T6">Nicht in CI:</text:span></text:p>
            <text:p text:style-name="P9"><text:span text:style-name="T8">▸ DB-Tests (benötigen Docker)</text:span></text:p>
            <text:p text:style-name="P9"><text:span text:style-name="T8">▸ E2E-Tests (benötigen Dev-Server)</text:span></text:p>
            <text:p text:style-name="P9"><text:span text:style-name="T8">▸ Load-Tests (manuell lokal)</text:span></text:p>
          </draw:text-box>
        </draw:frame>
        <draw:frame draw:style-name="gr4" draw:text-style-name="P10" draw:layer="layout" svg:width="11cm" svg:height="15cm" svg:x="13.5cm" svg:y="3.2cm">
          <draw:text-box>
            <text:p text:style-name="P8"><text:span text:style-name="T6">Warum kein DB-Service?</text:span></text:p>
            <text:p text:style-name="P8"><text:span text:style-name="T7"/></text:p>
            <text:p text:style-name="P8"><text:span text:style-name="T8">Die laufenden Tests berühren die DB nicht –</text:span></text:p>
            <text:p text:style-name="P8"><text:span text:style-name="T8">sie brechen vor dem ersten DB-Call ab</text:span></text:p>
            <text:p text:style-name="P8"><text:span text:style-name="T8">(Validierungsfehler) oder mocken die Modelle.</text:span></text:p>
            <text:p text:style-name="P8"><text:span text:style-name="T7"/></text:p>
            <text:p text:style-name="P8"><text:span text:style-name="T6">Keine DB = schnellere Pipeline.</text:span></text:p>
            <text:p text:style-name="P8"><text:span text:style-name="T7"/></text:p>
            <text:p text:style-name="P8"><text:span text:style-name="T6">Lokal ausführen:</text:span></text:p>
            <text:p text:style-name="P9"><text:span text:style-name="T10">npm test</text:span></text:p>
            <text:p text:style-name="P9"><text:span text:style-name="T10">npm run test:db</text:span></text:p>
            <text:p text:style-name="P9"><text:span text:style-name="T10">npm run test:e2e</text:span></text:p>
            <text:p text:style-name="P9"><text:span text:style-name="T10">k6 run load-tests/articles.j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6.2.4.2$Windows_X86_64 LibreOffice_project/0229ac93fcf0d7cbc6376066c6f35021cef002dc</meta:generator>
    <dc:date>2026-06-24T18:40:27.463944300</dc:date>
    <meta:editing-duration>PT7M30S</meta:editing-duration>
    <meta:editing-cycles>1</meta:editing-cycles>
    <meta:document-statistic meta:object-count="58"/>
  </office:meta>
</office:document-meta>
</file>